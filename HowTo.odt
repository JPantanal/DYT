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12a" officeooo:paragraph-rsid="000d212a"/>
    </style:style>
    <style:style style:name="P2" style:family="paragraph" style:parent-style-name="Standard">
      <style:text-properties officeooo:paragraph-rsid="000d212a"/>
    </style:style>
    <style:style style:name="T1" style:family="text">
      <style:text-properties fo:font-variant="normal" fo:text-transform="none" fo:color="#c9c9ca" loext:opacity="100%" fo:font-family="'DM Mono', ui-monospace, SFMono-Regular, Menlo, Monaco, Consolas, 'Liberation Mono', 'Courier New', monospace" fo:font-size="10.5pt" fo:letter-spacing="normal" fo:font-style="normal" fo:font-weight="normal"/>
    </style:style>
    <style:style style:name="T2" style:family="text">
      <style:text-properties officeooo:rsid="000d2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:</text:p>
      <text:p text:style-name="P1"/>
      <text:p text:style-name="P1">to update Project:</text:p>
      <text:p text:style-name="P1"><text:span text:style-name="T1">composer update </text:span><text:line-break/>npm install</text:p>
      <text:p text:style-name="P1">npm run dev</text:p>
      <text:p text:style-name="P1"/>
      <text:p text:style-name="P2"><text:span text:style-name="T2">If upgrading laravel: </text:span><text:span text:style-name="T1">composer require laravel/framework:^11.0</text:span></text:p>
      <text:p text:style-name="P2"><text:span text:style-name="T1"><text:s/>composer update </text:span><text:span text:style-name="T1">--with-all-dependencies </text:span></text:p>
      <text:p text:style-name="P2"><text:span text:style-name="T1">npm install npm run dev</text:span> </text:p>
      <text:p text:style-name="P1">npm run dev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1:28:02.741805200</meta:creation-date>
    <dc:date>2026-01-16T11:29:52.985432500</dc:date>
    <meta:editing-duration>PT1M50S</meta:editing-duration>
    <meta:editing-cycles>1</meta:editing-cycles>
    <meta:document-statistic meta:table-count="0" meta:image-count="0" meta:object-count="0" meta:page-count="1" meta:paragraph-count="8" meta:word-count="30" meta:character-count="202" meta:non-whitespace-character-count="177"/>
    <meta:generator>LibreOffice/25.8.3.2$Windows_X86_64 LibreOffice_project/8ca8d55c161d602844f5428fa4b58097424e324e</meta:generator>
  </office:meta>
</office:document-meta>
</file>