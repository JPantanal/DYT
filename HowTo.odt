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12a" officeooo:paragraph-rsid="000d212a"/>
    </style:style>
    <style:style style:name="P2" style:family="paragraph" style:parent-style-name="Standard">
      <style:text-properties officeooo:paragraph-rsid="000d212a"/>
    </style:style>
    <style:style style:name="P3" style:family="paragraph" style:parent-style-name="Standard">
      <style:text-properties officeooo:rsid="000d7264" officeooo:paragraph-rsid="000d7264"/>
    </style:style>
    <style:style style:name="T1" style:family="text">
      <style:text-properties fo:font-variant="normal" fo:text-transform="none" fo:color="#c9c9ca" loext:opacity="100%" fo:font-family="'DM Mono', ui-monospace, SFMono-Regular, Menlo, Monaco, Consolas, 'Liberation Mono', 'Courier New', monospace" fo:font-size="10.5pt" fo:letter-spacing="normal" fo:font-style="normal" fo:font-weight="normal"/>
    </style:style>
    <style:style style:name="T2" style:family="text">
      <style:text-properties officeooo:rsid="000d21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:</text:p>
      <text:p text:style-name="P1"/>
      <text:p text:style-name="P1">to update Project:</text:p>
      <text:p text:style-name="P1"><text:span text:style-name="T1">composer update </text:span><text:line-break/>npm install</text:p>
      <text:p text:style-name="P1">npm run dev</text:p>
      <text:p text:style-name="P1"/>
      <text:p text:style-name="P2"><text:span text:style-name="T2">If upgrading laravel: </text:span><text:span text:style-name="T1">composer require laravel/framework:^11.0</text:span></text:p>
      <text:p text:style-name="P2"><text:span text:style-name="T1"><text:s/>composer update </text:span><text:span text:style-name="T1">--with-all-dependencies </text:span></text:p>
      <text:p text:style-name="P2"><text:span text:style-name="T1">npm install npm run dev</text:span> </text:p>
      <text:p text:style-name="P1">npm run dev</text:p>
      <text:p text:style-name="P1"/>
      <text:p text:style-name="P3">If you get a dependency conflcit, install both together like: npm install @inertiajs/inertia@latest @inertiajs/inertia-vue3@lates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1:28:02.741805200</meta:creation-date>
    <dc:date>2026-01-18T14:00:17.114667300</dc:date>
    <meta:editing-duration>P2DT2H15M38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9" meta:word-count="44" meta:character-count="332" meta:non-whitespace-character-count="294"/>
  </office:meta>
</office:document-meta>
</file>