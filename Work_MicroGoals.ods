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pent all day trying to get this site to work on Production</text:p>
          </table:table-cell>
          <table:table-cell/>
          <table:table-cell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table:style-name="ce3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5">hp artisan cache:clear</text:span></text:p>
            <text:p><text:span text:style-name="T5">php artisan view:clear</text:span></text:p>
            <text:p><text:span text:style-name="T5">php artisan config:clear</text:span></text:p>
            <text:p><text:span text:style-name="T5">I spent hours on this stupid thing </text:span></text:p>
            <text:p><text:span text:style-name="T5">Trying to get it to work, finally</text:span></text:p>
            <text:p><text:span text:style-name="T5">I just commits my good good,</text:span></text:p>
            <text:p><text:span text:style-name="T5">Stopped and restarted sail. And I </text:span></text:p>
            <text:p><text:span text:style-name="T5">had a crazy permission error</text:span></text:p>
            <text:p><text:span text:style-name="T5">About a logging file. Basically </text:span></text:p>
            <text:p><text:span text:style-name="T5">after I ran the chowns,  </text:span></text:p>
            <text:p><text:span text:style-name="T5">And cleared cache my orginal </text:span></text:p>
            <text:p><text:span text:style-name="T5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style-name="ce2" office:value-type="date" office:date-value="2023-12-09" calcext:value-type="date">
            <text:p>12/09/23</text:p>
          </table:table-cell>
          <table:table-cell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<text:span text:style-name="T1">add Privacy Policy</text:span></text:p>
            <text:p><text:span text:style-name="T4">Add Terms of Use</text:span></text:p>
            <text:p><text:span text:style-name="T4">Remove 10:00pm – 6-am times on calendar</text:span></text:p>
            <text:p><text:span text:style-name="T4">Calendar Page check device look - &gt; made it look</text:span></text:p>
            <text:p><text:span text:style-name="T4">Just a bit better</text:span></text:p>
          </table:table-cell>
          <table:table-cell office:value-type="string" calcext:value-type="string">
            <text:p>1. Add Information of client and Tutor in calendar view</text:p>
            <text:p/>
            <text:p><text:span text:style-name="T1">2. click escape closes the modal</text:span></text:p>
            <text:p>3. add a type for Availibility</text:p>
            <text:p>4. Add Paypall page</text:p>
            <text:p>5. Add Toasts</text:p>
            <text:p>6. back end validation for availibilty</text:p>
            <text:p>7. sending reminder emails for Scheduled sessions</text:p>
            <text:p>8. showing already scheduled events as taken</text:p>
            <text:p>9. Show which tutor profile page you are on</text:p>
            <text:p>10. Add photo</text:p>
          </table:table-cell>
          <table:table-cell office:value-type="string" calcext:value-type="string">
            <text:p>1. save out 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hours</text:p>
          </table:table-cell>
          <table:table-cell office:value-type="string" calcext:value-type="string">
            <text:p>6 hou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PR Fixed 2 bugs on calender. Cleaned up device authenticated layo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graded vite to version 5+ from 4+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date" office:date-value="2026-01-19" calcext:value-type="date">
            <text:p>01/19/26</text:p>
          </table:table-cell>
          <table:table-cell table:style-name="ce2" office:value-type="date" office:date-value="2026-07-04" calcext:value-type="date">
            <text:p>07/04/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ck to working on this:</text:p>
          </table:table-cell>
          <table:table-cell office:value-type="string" calcext:value-type="string">
            <text:p>woorked on backgroudn col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updated projects and got it running locally agai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up landing page, it looks stup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imonial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 do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 testimonia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 scheduling modal layou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k to home page if not on. <text:s/>Conditionals</text:p>
          </table:table-cell>
          <table:table-cell table:number-columns-repeated="1021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8" table:number-columns-repeated="4" table:default-cell-style-name="ce9"/>
        <table:table-row table:style-name="ro1" table:number-rows-repeated="8">
          <table:table-cell table:number-columns-repeated="3"/>
          <table:table-cell table:style-name="Default"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9:11:48.09777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23T22:47:30.738231019</meta:creation-date>
    <dc:date>2026-07-04T21:18:11.288024000</dc:date>
    <meta:editing-duration>P1DT17H17M4S</meta:editing-duration>
    <meta:editing-cycles>19</meta:editing-cycles>
    <meta:generator>LibreOffice/26.2.4.2$Windows_X86_64 LibreOffice_project/0229ac93fcf0d7cbc6376066c6f35021cef002dc</meta:generator>
    <meta:document-statistic meta:table-count="2" meta:cell-count="80" meta:object-count="0"/>
  </office:meta>
</office:document-meta>
</file>