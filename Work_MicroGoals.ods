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5.5673in"/>
    </style:style>
    <style:style style:name="co5" style:family="table-column">
      <style:table-column-properties fo:break-before="auto" style:column-width="3.004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4.4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2.2591in" fo:break-before="auto" style:use-optimal-row-height="false"/>
    </style:style>
    <style:style style:name="ro8" style:family="table-row">
      <style:table-row-properties style:row-height="1.9917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8" style:family="table-cell" style:parent-style-name="Default">
      <style:text-properties fo:color="#000000" fo:font-size="12pt" style:font-size-asian="12pt" style:font-size-complex="12pt"/>
    </style:style>
    <style:style style:name="ce10" style:family="table-cell" style:parent-style-name="Default">
      <style:text-properties style:text-line-through-style="solid" style:text-line-through-type="single" fo:font-size="12pt" style:font-size-asian="12pt" style:font-size-complex="12pt"/>
    </style:style>
    <style:style style:name="ce3" style:family="table-cell" style:parent-style-name="Default">
      <style:table-cell-properties fo:background-color="#ffd8ce"/>
    </style:style>
    <style:style style:name="ce12" style:family="table-cell" style:parent-style-name="Default">
      <style:text-properties fo:color="#000000" style:text-line-through-style="solid" style:text-line-through-type="singl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style:text-line-through-style="solid" style:text-line-through-type="single" fo:font-size="12pt" style:text-underline-style="wave" style:text-underline-width="auto" style:text-underline-color="font-color" style:font-size-asian="12pt" style:font-size-complex="12pt"/>
    </style:style>
    <style:style style:name="ce4" style:family="table-cell" style:parent-style-name="Default">
      <style:table-cell-properties fo:background-color="#ea7500" fo:wrap-option="wrap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fo:font-size="10pt" style:text-line-through-type="single" style:font-size-asian="10pt" style:font-size-complex="10pt"/>
    </style:style>
    <style:style style:name="T3" style:family="text">
      <style:text-properties fo:color="#8d281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table:style-name="Default" office:value-type="string" calcext:value-type="string">
            <text:p>4 hours</text:p>
          </table:table-cell>
          <table:table-cell table:style-name="Default" office:value-type="string" calcext:value-type="string">
            <text:p>7 hours</text:p>
          </table:table-cell>
          <table:table-cell table:style-name="Default"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4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/>
          <table:table-cell table:style-name="ce1" office:value-type="string" calcext:value-type="string">
            <text:p>Finished writing update modal .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Short term Goals</text:p>
          </table:table-cell>
          <table:table-cell table:style-name="Default"/>
          <table:table-cell table:number-columns-repeated="1020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1. Design new modal</text:p>
            <text:p><text:span text:style-name="T2">1.1 can update Events</text:span></text:p>
            <text:p><text:span text:style-name="T1">1.2 Tutor can See Events Scheduled</text:span></text:p>
            <text:p><text:span text:style-name="T1">1.3 Tutor approves or Denies Event</text:span></text:p>
            <text:p>1.4 Edit modal Size, Transitions</text:p>
            <text:p/>
            <text:p><text:span text:style-name="T1">2. back end for updating event</text:span></text:p>
            <text:p><text:span text:style-name="T1">3. Change color for Pending events to light blue</text:span></text:p>
            <text:p><text:span text:style-name="T1">4. Approved Events are dark blue</text:span></text:p>
            <text:p>5. Make calender smaller on screen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style-name="ce2" office:value-type="date" office:date-value="2023-11-29" calcext:value-type="date">
            <text:p>11/29/23</text:p>
          </table:table-cell>
          <table:table-cell table:style-name="ce2" office:value-type="date" office:date-value="2023-11-30" calcext:value-type="date">
            <text:p>11/30/23</text:p>
          </table:table-cell>
          <table:table-cell table:style-name="ce2" office:value-type="date" office:date-value="2023-12-01" calcext:value-type="date">
            <text:p>12/01/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pent</text:p>
          </table:table-cell>
          <table:table-cell table:number-columns-repeated="2" table:style-name="Default" office:value-type="string" calcext:value-type="string">
            <text:p>4 hours</text:p>
          </table:table-cell>
          <table:table-cell table:style-name="Default" office:value-type="string" calcext:value-type="string">
            <text:p>noth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Deploy to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d on</text:p>
          </table:table-cell>
          <table:table-cell table:style-name="Default" office:value-type="string" calcext:value-type="string">
            <text:p>Finished writing update modal </text:p>
          </table:table-cell>
          <table:table-cell table:style-name="Default" office:value-type="string" calcext:value-type="string">
            <text:p>edits to modal, different view for different user</text:p>
          </table:table-cell>
          <table:table-cell table:style-name="Default"/>
          <table:table-cell/>
          <table:table-cell office:value-type="string" calcext:value-type="string">
            <text:p>add type for admin to show availibility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worked on update API request was stuck for hours</text:p>
          </table:table-cell>
          <table:table-cell table:style-name="Default" table:number-columns-repeated="2"/>
          <table:table-cell office:value-type="string" calcext:value-type="string">
            <text:p>brings back tutors ev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table:style-name="Default" table:number-columns-repeated="3"/>
          <table:table-cell office:value-type="string" calcext:value-type="string">
            <text:p>change color events (function in view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 table:number-columns-repeated="1020"/>
        </table:table-row>
        <table:table-row table:style-name="ro5">
          <table:table-cell/>
          <table:table-cell table:style-name="Default" office:value-type="string" calcext:value-type="string">
            <text:p>longer term: 1.new Database Migrations, rename stuff</text:p>
            <text:p>2. Fix Calender Time: S<text:span text:style-name="T1">tored as UTC time</text:span></text:p>
            <text:p>     Displayed as Eastern</text:p>
          </table:table-cell>
          <table:table-cell table:style-name="ce3" office:value-type="string" calcext:value-type="string">
            <text:p>1. Design new modal</text:p>
            <text:p>1.1- should clear modal or make new one.</text:p>
            <text:p><text:span text:style-name="T1">1.2 Tutor can See Events Scheduled:</text:span></text:p>
            <text:p><text:span text:style-name="T3">1.3 Back end Validation for updating events</text:span></text:p>
            <text:p>1.4 Edit modal Size, Transitions</text:p>
            <text:p/>
            <text:p><text:span text:style-name="T1">3. Change color for Pending events to light blue</text:span></text:p>
            <text:p>4. <text:span text:style-name="T1">Approved Events are Green</text:span></text:p>
            <text:p>5. Make Calender smaller on screen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date" office:date-value="2023-12-04" calcext:value-type="date">
            <text:p>12/04/23</text:p>
          </table:table-cell>
          <table:table-cell table:style-name="ce2" office:value-type="date" office:date-value="2023-12-05" calcext:value-type="date">
            <text:p>12/05/23</text:p>
          </table:table-cell>
          <table:table-cell table:style-name="ce2" office:value-type="date" office:date-value="2023-12-06" calcext:value-type="date">
            <text:p>12/06/23</text:p>
          </table:table-cell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6 hours</text:p>
          </table:table-cell>
          <table:table-cell table:style-name="Default" office:value-type="string" calcext:value-type="string">
            <text:p>NOTHING</text:p>
          </table:table-cell>
          <table:table-cell table:style-name="Default" office:value-type="string" calcext:value-type="string">
            <text:p>2 hours</text:p>
          </table:table-cell>
          <table:table-cell office:value-type="string" calcext:value-type="string">
            <text:p>3 hours then got busy with work</text:p>
          </table:table-cell>
          <table:table-cell office:value-type="string" calcext:value-type="string">
            <text:p>got emails to send locally</text:p>
          </table:table-cell>
          <table:table-cell table:number-columns-repeated="1018"/>
        </table:table-row>
        <table:table-row table:style-name="ro6">
          <table:table-cell/>
          <table:table-cell table:style-name="Default" office:value-type="string" calcext:value-type="string">
            <text:p>Spent all day trying to get this site to work on Production</text:p>
          </table:table-cell>
          <table:table-cell table:style-name="Default"/>
          <table:table-cell table:style-name="Default" office:value-type="string" calcext:value-type="string">
            <text:p>removed chirps locally. Issue with Production build with vite on dev. </text:p>
          </table:table-cell>
          <table:table-cell office:value-type="string" calcext:value-type="string">
            <text:p>Emails are “sending” locally, don’t see </text:p>
            <text:p>Local mail server. And message is messed up</text:p>
          </table:table-cell>
          <table:table-cell office:value-type="string" calcext:value-type="string">
            <text:p>they go to the local email server!! </text:p>
          </table:table-cell>
          <table:table-cell table:number-columns-repeated="1018"/>
        </table:table-row>
        <table:table-row table:style-name="ro7">
          <table:table-cell/>
          <table:table-cell table:style-name="Default" office:value-type="string" calcext:value-type="string">
            <text:p>solution was found by looking at different logging files</text:p>
            <text:p>in public directory, and the actual project solution. </text:p>
            <text:p>i had to build the front end and put the build file in </text:p>
            <text:p>the public directory. moving the public directory from</text:p>
            <text:p>the main project folder public caused a sht ton of issues. </text:p>
            <text:p>still not sure if that is the best thing to do but i for now i'm doing it.</text:p>
            <text:p>I had to edit index.php to get remap everything.</text:p>
            <text:p>Edit hosts file on local pc to view site. WEBSITE IS UP</text:p>
            <text:p/>
          </table:table-cell>
          <table:table-cell table:style-name="Default"/>
          <table:table-cell table:style-name="ce3" office:value-type="string" calcext:value-type="string">
            <text:p><text:a xlink:href="mailto:Dragondoor@6665" xlink:type="simple">Dragondoor@6665</text:a></text:p>
          </table:table-cell>
          <table:table-cell office:value-type="string" calcext:value-type="string">
            <text:p>set up email:</text:p>
            <text:p>dig -x 49.24.222.67.in-adr.arpa</text:p>
            <text:p>Returns ndxdomain. I think I think</text:p>
            <text:p>I need to set the domain godaddy.</text:p>
            <text:p>Sending email says: 550 invalid DNS MX </text:p>
          </table:table-cell>
          <table:table-cell office:value-type="string" calcext:value-type="string">
            <text:p>p<text:span text:style-name="T5">hp artisan cache:clear</text:span></text:p>
            <text:p><text:span text:style-name="T5">php artisan view:clear</text:span></text:p>
            <text:p><text:span text:style-name="T5">php artisan config:clear</text:span></text:p>
            <text:p><text:span text:style-name="T5">I spent hours on this stupid thing </text:span></text:p>
            <text:p><text:span text:style-name="T5">Trying to get it to work, finally</text:span></text:p>
            <text:p><text:span text:style-name="T5">I just commits my good good,</text:span></text:p>
            <text:p><text:span text:style-name="T5">Stopped and restarted sail. And I </text:span></text:p>
            <text:p><text:span text:style-name="T5">had a crazy permission error</text:span></text:p>
            <text:p><text:span text:style-name="T5">About a logging file. Basically </text:span></text:p>
            <text:p><text:span text:style-name="T5">after I ran the chowns,  </text:span></text:p>
            <text:p><text:span text:style-name="T5">And cleared cache my orginal </text:span></text:p>
            <text:p><text:span text:style-name="T5">Problem was fixed.</text:span>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style-name="ce2" office:value-type="date" office:date-value="2023-12-09" calcext:value-type="date">
            <text:p>12/09/23</text:p>
          </table:table-cell>
          <table:table-cell/>
          <table:table-cell office:value-type="string" calcext:value-type="string">
            <text:p>\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<text:span text:style-name="T1">add Privacy Policy</text:span></text:p>
            <text:p><text:span text:style-name="T4">Add Terms of Use</text:span></text:p>
            <text:p><text:span text:style-name="T4">Remove 10:00pm – 6-am times on calendar</text:span></text:p>
            <text:p><text:span text:style-name="T4">Calendar Page check device look - &gt; made it look</text:span></text:p>
            <text:p><text:span text:style-name="T4">Just a bit better</text:span></text:p>
          </table:table-cell>
          <table:table-cell office:value-type="string" calcext:value-type="string">
            <text:p>1. Add Information of client and Tutor in calendar view</text:p>
            <text:p/>
            <text:p><text:span text:style-name="T1">2. click escape closes the modal</text:span></text:p>
            <text:p>3. add a type for Availibility</text:p>
            <text:p>4. Add Paypall page</text:p>
            <text:p>5. Add Toasts</text:p>
            <text:p>6. back end validation for availibilty</text:p>
            <text:p>7. sending reminder emails for Scheduled sessions</text:p>
            <text:p>8. showing already scheduled events as taken</text:p>
            <text:p>9. Show which tutor profile page you are on</text:p>
            <text:p>10. Add photo</text:p>
          </table:table-cell>
          <table:table-cell office:value-type="string" calcext:value-type="string">
            <text:p>1. save out notes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string" calcext:value-type="string">
            <text:p>3 hours</text:p>
          </table:table-cell>
          <table:table-cell office:value-type="string" calcext:value-type="string">
            <text:p>6 hours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In PR Fixed 2 bugs on calender. Cleaned up device authenticated layout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upgraded vite to version 5+ from 4+</text:p>
          </table:table-cell>
          <table:table-cell table:number-columns-repeated="1020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7" office:value-type="date" office:date-value="2026-01-19" calcext:value-type="date">
            <text:p>01/19/26</text:p>
          </table:table-cell>
          <table:table-cell table:style-name="ce7" office:value-type="date" office:date-value="2026-07-04" calcext:value-type="date">
            <text:p>07/04/26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back to working on this:</text:p>
          </table:table-cell>
          <table:table-cell office:value-type="string" calcext:value-type="string">
            <text:p>woorked on backgroudn color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I updated projects and got it running locally again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et up landing page, it looks stupid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add: 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estimonials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 calcext:value-type="string">
            <text:p>to do:</text:p>
          </table:table-cell>
          <table:table-cell table:number-columns-repeated="1021"/>
        </table:table-row>
        <table:table-row table:style-name="ro9">
          <table:table-cell/>
          <table:table-cell table:style-name="ce8"/>
          <table:table-cell table:style-name="ce12" office:value-type="string" calcext:value-type="string">
            <text:p>fix testimonials good enough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 calcext:value-type="string">
            <text:p>fix scheduling modal layout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 calcext:value-type="string">
            <text:p>link to home page if not on. <text:s/>Conditionals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3" office:value-type="string" calcext:value-type="string">
            <text:p>remove Dashboard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3"/>
          <table:table-cell office:value-type="string" calcext:value-type="string">
            <text:p>keep dashbaord I should put alerts on that. </text:p>
          </table:table-cell>
          <table:table-cell table:number-columns-repeated="1020"/>
        </table:table-row>
        <table:table-row table:style-name="ro9">
          <table:table-cell/>
          <table:table-cell table:style-name="ce10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8" table:number-columns-repeated="3" table:default-cell-style-name="Default"/>
        <table:table-column table:style-name="co8" table:number-columns-repeated="4" table:default-cell-style-name="ce9"/>
        <table:table-row table:style-name="ro1" table:number-rows-repeated="8">
          <table:table-cell table:number-columns-repeated="3"/>
          <table:table-cell table:style-name="Default" table:number-columns-repeated="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6:51:13.09903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1-23T22:47:30.738231019</meta:creation-date>
    <dc:date>2026-07-06T15:42:02.725195400</dc:date>
    <meta:editing-duration>P2DT15H7M24S</meta:editing-duration>
    <meta:editing-cycles>21</meta:editing-cycles>
    <meta:generator>LibreOffice/26.2.4.2$Windows_X86_64 LibreOffice_project/0229ac93fcf0d7cbc6376066c6f35021cef002dc</meta:generator>
    <meta:document-statistic meta:table-count="2" meta:cell-count="82" meta:object-count="0"/>
  </office:meta>
</office:document-meta>
</file>