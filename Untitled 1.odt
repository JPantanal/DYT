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4225" officeooo:paragraph-rsid="001242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 believe everything may be OK.  ProviderPro (Zion) databases have their structure database set as blank, so it comes from the actual build Standards on ProdSQL 1 (Standards_4_210_1007_5).  DataPlus databases are set to have Structure of "DataPlus Standards Master", which is actually the current releases Standards Master on DevSQL 1 (currently ISS_StandardsMaster_4_210). Currently that has a DatabaseVersion of 4.210.1003.5, so if the changes for YOS-17286 are in ISS_StandardsMaster_4_210 then we are good</text:p>
      <text:p text:style-name="Text_20_body"> </text:p>
      <text:p text:style-name="Text_20_body">When we "set DataPlus databases to update" for new releases, we are changing the "DataPlus Standards Master" database object to refer to the StandardsMaster for the new build.  </text:p>
      <text:p text:style-name="Text_20_body">more info: </text:p>
      <text:p text:style-name="Text_20_body">when a Public or Master build runs, it updates StructureMaster to the latest build version, so the last Public build is 4.210.1007.5 and that is what is in ISS_StructureMaster_4_210, When we run Update Standards Master, Standards Master gets a DB update with StructureMaster as it's Structure, so it is then that the Standards Master DB Version gets updated</text:p>
      <text:p text:style-name="Text_20_body"> </text:p>
      <text:p text:style-name="Text_20_body">So when Tristan added the new config and ran Update Standards Master, Standards Master got the current build version (4.210.1003.5) and then when the build happened (4.210.1007.5) Structure Master got updated, but Standards Master did not.  If we run Update Standards Master again, it should have the 4.210.1007.5 version</text:p>
      <text:p text:style-name="P1">public build updates <text:s/>structure master</text:p>
      <text:p text:style-name="P1"/>
      <text:p text:style-name="P1">Update Standards Master, Standards Master gets a DB update with StructureMaster as it's Structu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8T10:02:01.898895900</meta:creation-date>
    <dc:date>2026-06-20T16:25:26.035891700</dc:date>
    <meta:editing-duration>P2DT6H13M10S</meta:editing-duration>
    <meta:editing-cycles>1</meta:editing-cycles>
    <meta:document-statistic meta:table-count="0" meta:image-count="0" meta:object-count="0" meta:page-count="1" meta:paragraph-count="9" meta:word-count="228" meta:character-count="1513" meta:non-whitespace-character-count="1282"/>
    <meta:generator>LibreOffice/25.8.6.2$Windows_X86_64 LibreOffice_project/b4b39682cd9868fa725bc664aff94278d315bd04</meta:generator>
  </office:meta>
</office:document-meta>
</file>